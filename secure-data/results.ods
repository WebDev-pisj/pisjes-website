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merit2020">
        <table:table-row>
          <table:table-cell office:value-type="string">
            <text:p>2047119595</text:p>
          </table:table-cell>
          <table:table-cell office:value-type="string">
            <text:p>Abdullah   Nabeel Ahmed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02801996</text:p>
          </table:table-cell>
          <table:table-cell office:value-type="string">
            <text:p>Ayesha   Nabeel Ahmed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12233445</text:p>
          </table:table-cell>
          <table:table-cell office:value-type="string">
            <text:p>Rabee Ahmed Qureshi   Qureshi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22222222</text:p>
          </table:table-cell>
          <table:table-cell office:value-type="string">
            <text:p>Rayyan   Muhammad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23232323</text:p>
          </table:table-cell>
          <table:table-cell office:value-type="string">
            <text:p>Abdullah   Muhammad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26345016</text:p>
          </table:table-cell>
          <table:table-cell office:value-type="string">
            <text:p>Aroush   Muhammad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43334843</text:p>
          </table:table-cell>
          <table:table-cell office:value-type="string">
            <text:p>Hoorain   Siddiqu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43334929</text:p>
          </table:table-cell>
          <table:table-cell office:value-type="string">
            <text:p>Rida   Siddiqui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43336532</text:p>
          </table:table-cell>
          <table:table-cell office:value-type="string">
            <text:p>AYESHA   NOOR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44244659</text:p>
          </table:table-cell>
          <table:table-cell office:value-type="string">
            <text:p>Hareem    Saqib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45871201</text:p>
          </table:table-cell>
          <table:table-cell office:value-type="string">
            <text:p>Hamna   Farhan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08410710</text:p>
          </table:table-cell>
          <table:table-cell office:value-type="string">
            <text:p>Bella Alaa E    Albieruti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60734005</text:p>
          </table:table-cell>
          <table:table-cell office:value-type="string">
            <text:p>Abdul Hadi   Malik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60734006</text:p>
          </table:table-cell>
          <table:table-cell office:value-type="string">
            <text:p>Muhammad Ahmad   Malik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77929374</text:p>
          </table:table-cell>
          <table:table-cell office:value-type="string">
            <text:p>ABDUL RAFAE   HUSSAIN</text:p>
          </table:table-cell>
          <table:table-cell office:value-type="string">
            <text:p>Y10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04484138</text:p>
          </table:table-cell>
          <table:table-cell office:value-type="string">
            <text:p>Zainab    Shakeel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06795127</text:p>
          </table:table-cell>
          <table:table-cell office:value-type="string">
            <text:p>ABDUL HADI   HUSSAIN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07095758</text:p>
          </table:table-cell>
          <table:table-cell office:value-type="string">
            <text:p>Iffah   Nabeel ahmed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08585914</text:p>
          </table:table-cell>
          <table:table-cell office:value-type="string">
            <text:p>SYED MUHAMMAD BIN    KHALID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08685300</text:p>
          </table:table-cell>
          <table:table-cell office:value-type="string">
            <text:p>Shahreen   Hamid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08993506</text:p>
          </table:table-cell>
          <table:table-cell office:value-type="string">
            <text:p>Zainab   Akhtar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15212478</text:p>
          </table:table-cell>
          <table:table-cell office:value-type="string">
            <text:p>MARYAM  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19828691</text:p>
          </table:table-cell>
          <table:table-cell office:value-type="string">
            <text:p>OWAES   ABLA</text:p>
          </table:table-cell>
          <table:table-cell office:value-type="string">
            <text:p>Y10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23483004</text:p>
          </table:table-cell>
          <table:table-cell office:value-type="string">
            <text:p>Abeer    Ahmed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28002452</text:p>
          </table:table-cell>
          <table:table-cell office:value-type="string">
            <text:p>Eshal   Asad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34308935</text:p>
          </table:table-cell>
          <table:table-cell office:value-type="string">
            <text:p>Rufia   Syeda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42693971</text:p>
          </table:table-cell>
          <table:table-cell office:value-type="string">
            <text:p>Muhammad Umar   Desai</text:p>
          </table:table-cell>
          <table:table-cell office:value-type="string">
            <text:p>Y7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43587859</text:p>
          </table:table-cell>
          <table:table-cell office:value-type="string">
            <text:p>RAHMAH JUNAID    DAR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45284000</text:p>
          </table:table-cell>
          <table:table-cell office:value-type="string">
            <text:p>Ilhaan   Khan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45678910</text:p>
          </table:table-cell>
          <table:table-cell office:value-type="string">
            <text:p>AYESHA   HARIS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47951027</text:p>
          </table:table-cell>
          <table:table-cell office:value-type="string">
            <text:p>TAHA   SOOMRO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48366226</text:p>
          </table:table-cell>
          <table:table-cell office:value-type="string">
            <text:p>Amna   kamran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49293924</text:p>
          </table:table-cell>
          <table:table-cell office:value-type="string">
            <text:p>Aiman   Hasan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53547085</text:p>
          </table:table-cell>
          <table:table-cell office:value-type="string">
            <text:p>Huzaifa    Umar Dar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56015643</text:p>
          </table:table-cell>
          <table:table-cell office:value-type="string">
            <text:p>Manal   Kh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56015644</text:p>
          </table:table-cell>
          <table:table-cell office:value-type="string">
            <text:p>Mahveen   K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56869549</text:p>
          </table:table-cell>
          <table:table-cell office:value-type="string">
            <text:p>Syed Taha   Mustafa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56869551</text:p>
          </table:table-cell>
          <table:table-cell office:value-type="string">
            <text:p>Syeda Fatima   Zahra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58451091</text:p>
          </table:table-cell>
          <table:table-cell office:value-type="string">
            <text:p>Haider Imran    Akram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58727630</text:p>
          </table:table-cell>
          <table:table-cell office:value-type="string">
            <text:p>HAREEM   QURESHI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62369940</text:p>
          </table:table-cell>
          <table:table-cell office:value-type="string">
            <text:p>SHAHEER   HAMMAD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64140323</text:p>
          </table:table-cell>
          <table:table-cell office:value-type="string">
            <text:p>MARIA   ABDUL KAREEM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68739849</text:p>
          </table:table-cell>
          <table:table-cell office:value-type="string">
            <text:p>Manal   Hasan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73057427</text:p>
          </table:table-cell>
          <table:table-cell office:value-type="string">
            <text:p>MASKAN   JAVED IQBAL</text:p>
          </table:table-cell>
          <table:table-cell office:value-type="string">
            <text:p>Y9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73447626</text:p>
          </table:table-cell>
          <table:table-cell office:value-type="string">
            <text:p>MOHAMMAD JUNAID    DAR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86790089</text:p>
          </table:table-cell>
          <table:table-cell office:value-type="string">
            <text:p>Maryam   Imaan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87383470</text:p>
          </table:table-cell>
          <table:table-cell office:value-type="string">
            <text:p>SYED MUHAMMAD HASSAAN   MAHMOOD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88454160</text:p>
          </table:table-cell>
          <table:table-cell office:value-type="string">
            <text:p>Affan    Warsi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89155868</text:p>
          </table:table-cell>
          <table:table-cell office:value-type="string">
            <text:p>Muhammad Rayyan   Rayyan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0118814</text:p>
          </table:table-cell>
          <table:table-cell office:value-type="string">
            <text:p>Arooba Ashiq    Ali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0778931</text:p>
          </table:table-cell>
          <table:table-cell office:value-type="string">
            <text:p>Aliza   Fatima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1111111</text:p>
          </table:table-cell>
          <table:table-cell office:value-type="string">
            <text:p>Abdullah   Zeeshan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1111112</text:p>
          </table:table-cell>
          <table:table-cell office:value-type="string">
            <text:p>Hassan   Zeesh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1714207</text:p>
          </table:table-cell>
          <table:table-cell office:value-type="string">
            <text:p>Sheikh Fahad   Zafar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2590565</text:p>
          </table:table-cell>
          <table:table-cell office:value-type="string">
            <text:p>MASEERA   AHMAD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3833757</text:p>
          </table:table-cell>
          <table:table-cell office:value-type="string">
            <text:p>Syed Muhammad    Hassan Uddin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5759091</text:p>
          </table:table-cell>
          <table:table-cell office:value-type="string">
            <text:p>MIRSAB    QURESHI</text:p>
          </table:table-cell>
          <table:table-cell office:value-type="string">
            <text:p>Y5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7183860</text:p>
          </table:table-cell>
          <table:table-cell office:value-type="string">
            <text:p>Husna   Suhail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7588340</text:p>
          </table:table-cell>
          <table:table-cell office:value-type="string">
            <text:p>Mustafa   Khan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9367396</text:p>
          </table:table-cell>
          <table:table-cell office:value-type="string">
            <text:p>uroosh   Ahmed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99389175</text:p>
          </table:table-cell>
          <table:table-cell office:value-type="string">
            <text:p>Hadia   Muhammad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00041626</text:p>
          </table:table-cell>
          <table:table-cell office:value-type="string">
            <text:p>ZAINAB NOMAN    MALIK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00041634</text:p>
          </table:table-cell>
          <table:table-cell office:value-type="string">
            <text:p>FATIMA NOMAN   MALIK</text:p>
          </table:table-cell>
          <table:table-cell office:value-type="string">
            <text:p>Y10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04849074</text:p>
          </table:table-cell>
          <table:table-cell office:value-type="string">
            <text:p>Noor   Fatima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04985554</text:p>
          </table:table-cell>
          <table:table-cell office:value-type="string">
            <text:p>Hareem   Hassan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14452388</text:p>
          </table:table-cell>
          <table:table-cell office:value-type="string">
            <text:p>Minsa Fatlma   -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14678372</text:p>
          </table:table-cell>
          <table:table-cell office:value-type="string">
            <text:p>Wasi    Ilyas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15915177</text:p>
          </table:table-cell>
          <table:table-cell office:value-type="string">
            <text:p>Rayyan    Mohsin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17902349</text:p>
          </table:table-cell>
          <table:table-cell office:value-type="string">
            <text:p>ADAM   ABLA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18531923</text:p>
          </table:table-cell>
          <table:table-cell office:value-type="string">
            <text:p>Zainab   Hasan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18624439</text:p>
          </table:table-cell>
          <table:table-cell office:value-type="string">
            <text:p>Muhammad Aryan   Arshad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19279449</text:p>
          </table:table-cell>
          <table:table-cell office:value-type="string">
            <text:p>MUHAMMAD KABIR   ALI</text:p>
          </table:table-cell>
          <table:table-cell office:value-type="string">
            <text:p>Y7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1957693</text:p>
          </table:table-cell>
          <table:table-cell office:value-type="string">
            <text:p>Muhammad   Talal</text:p>
          </table:table-cell>
          <table:table-cell office:value-type="string">
            <text:p>Y3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211341I</text:p>
          </table:table-cell>
          <table:table-cell office:value-type="string">
            <text:p>Zayyan Obaid   Khan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6133738</text:p>
          </table:table-cell>
          <table:table-cell office:value-type="string">
            <text:p>MOHID    SHAKEEL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6133746</text:p>
          </table:table-cell>
          <table:table-cell office:value-type="string">
            <text:p>Fatima   Shakeel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6643058</text:p>
          </table:table-cell>
          <table:table-cell office:value-type="string">
            <text:p>Raed   Osama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7941816</text:p>
          </table:table-cell>
          <table:table-cell office:value-type="string">
            <text:p>Manaal   Omair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9276088</text:p>
          </table:table-cell>
          <table:table-cell office:value-type="string">
            <text:p>Abdullah   Hassan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9342301</text:p>
          </table:table-cell>
          <table:table-cell office:value-type="string">
            <text:p>Abdul    Hadi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35349820</text:p>
          </table:table-cell>
          <table:table-cell office:value-type="string">
            <text:p>HUSNA   ZAMIN</text:p>
          </table:table-cell>
          <table:table-cell office:value-type="string">
            <text:p>Y3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37599315</text:p>
          </table:table-cell>
          <table:table-cell office:value-type="string">
            <text:p>ABDULLAH AHMED   KHAN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37950187</text:p>
          </table:table-cell>
          <table:table-cell office:value-type="string">
            <text:p>Malek   Ismail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38226175</text:p>
          </table:table-cell>
          <table:table-cell office:value-type="string">
            <text:p>Alina   Irfan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39020021</text:p>
          </table:table-cell>
          <table:table-cell office:value-type="string">
            <text:p>Bilal   Mahmood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39020039</text:p>
          </table:table-cell>
          <table:table-cell office:value-type="string">
            <text:p>YOUSUF   MAHMOOD</text:p>
          </table:table-cell>
          <table:table-cell office:value-type="string">
            <text:p>Y6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2118861</text:p>
          </table:table-cell>
          <table:table-cell office:value-type="string">
            <text:p>MOHAMMED FAHAD SAYEED   BIN ALI AL-HAJJ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2956690</text:p>
          </table:table-cell>
          <table:table-cell office:value-type="string">
            <text:p>IBRAHIM   KHAN</text:p>
          </table:table-cell>
          <table:table-cell office:value-type="string">
            <text:p>Y2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3389313</text:p>
          </table:table-cell>
          <table:table-cell office:value-type="string">
            <text:p>Hamdaan   Omair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3394066</text:p>
          </table:table-cell>
          <table:table-cell office:value-type="string">
            <text:p>Enayah   Irfan</text:p>
          </table:table-cell>
          <table:table-cell office:value-type="string">
            <text:p>Y10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3394073</text:p>
          </table:table-cell>
          <table:table-cell office:value-type="string">
            <text:p>Muhammad Arham   Irfan</text:p>
          </table:table-cell>
          <table:table-cell office:value-type="string">
            <text:p>Y8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4407841</text:p>
          </table:table-cell>
          <table:table-cell office:value-type="string">
            <text:p>ARWA   BAKHT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5811769</text:p>
          </table:table-cell>
          <table:table-cell office:value-type="string">
            <text:p>Ameera Humayun   Khan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6125672</text:p>
          </table:table-cell>
          <table:table-cell office:value-type="string">
            <text:p>Yumna   Suhail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6552354</text:p>
          </table:table-cell>
          <table:table-cell office:value-type="string">
            <text:p>Aminah Tahir   Tahir Zaman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47669454</text:p>
          </table:table-cell>
          <table:table-cell office:value-type="string">
            <text:p>Hanah   Zeeshan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1878199</text:p>
          </table:table-cell>
          <table:table-cell office:value-type="string">
            <text:p>Raghad   Ahmed</text:p>
          </table:table-cell>
          <table:table-cell office:value-type="string">
            <text:p>Y2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2182807</text:p>
          </table:table-cell>
          <table:table-cell office:value-type="string">
            <text:p>Hamza    Muhammad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2460575</text:p>
          </table:table-cell>
          <table:table-cell office:value-type="string">
            <text:p>Asiyah   Ahmad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2835057</text:p>
          </table:table-cell>
          <table:table-cell office:value-type="string">
            <text:p>FATIMA  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4741422</text:p>
          </table:table-cell>
          <table:table-cell office:value-type="string">
            <text:p>Affan    Mohsin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5279642</text:p>
          </table:table-cell>
          <table:table-cell office:value-type="string">
            <text:p>USMAN   MOHSIN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8920978</text:p>
          </table:table-cell>
          <table:table-cell office:value-type="string">
            <text:p>Hajira    Shakeel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9878357</text:p>
          </table:table-cell>
          <table:table-cell office:value-type="string">
            <text:p>Zoha   Talal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62141405</text:p>
          </table:table-cell>
          <table:table-cell office:value-type="string">
            <text:p>Zara   Zeesh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64304829</text:p>
          </table:table-cell>
          <table:table-cell office:value-type="string">
            <text:p>Muhammed Hadi   Abdulrashid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64304837</text:p>
          </table:table-cell>
          <table:table-cell office:value-type="string">
            <text:p>Omer   ABDULRASHID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67134116</text:p>
          </table:table-cell>
          <table:table-cell office:value-type="string">
            <text:p>Sophia Hasan   Shafi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70246352</text:p>
          </table:table-cell>
          <table:table-cell office:value-type="string">
            <text:p>Rameen Khuram    kh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73726271</text:p>
          </table:table-cell>
          <table:table-cell office:value-type="string">
            <text:p>MARYAM IRFAN   FAROOQ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75394157</text:p>
          </table:table-cell>
          <table:table-cell office:value-type="string">
            <text:p>Rayyan   K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78169259</text:p>
          </table:table-cell>
          <table:table-cell office:value-type="string">
            <text:p>EMAN   SHAHZAD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78558360</text:p>
          </table:table-cell>
          <table:table-cell office:value-type="string">
            <text:p>Ammar   Kh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79982122</text:p>
          </table:table-cell>
          <table:table-cell office:value-type="string">
            <text:p>AMAAR   MAHMOUD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0763883</text:p>
          </table:table-cell>
          <table:table-cell office:value-type="string">
            <text:p>Arwa   Muhammad Irf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1113021</text:p>
          </table:table-cell>
          <table:table-cell office:value-type="string">
            <text:p>Sundas   Am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2151905</text:p>
          </table:table-cell>
          <table:table-cell office:value-type="string">
            <text:p>RAYAN    SAAD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2313760</text:p>
          </table:table-cell>
          <table:table-cell office:value-type="string">
            <text:p>Ameerah   Farooqu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2830177</text:p>
          </table:table-cell>
          <table:table-cell office:value-type="string">
            <text:p>Mominah   Sohail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3395684</text:p>
          </table:table-cell>
          <table:table-cell office:value-type="string">
            <text:p>Mishaal   Muhammed Ayyoub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3647951</text:p>
          </table:table-cell>
          <table:table-cell office:value-type="string">
            <text:p>ABDULLAH   SOOMRO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4482142</text:p>
          </table:table-cell>
          <table:table-cell office:value-type="string">
            <text:p>Dawood   Nasir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4799230</text:p>
          </table:table-cell>
          <table:table-cell office:value-type="string">
            <text:p>FARWAH   AHMED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6319458</text:p>
          </table:table-cell>
          <table:table-cell office:value-type="string">
            <text:p>NA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6338540</text:p>
          </table:table-cell>
          <table:table-cell office:value-type="string">
            <text:p>Mariam   Wajahat Hussai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9626453</text:p>
          </table:table-cell>
          <table:table-cell office:value-type="string">
            <text:p>MUSTAFA   HUSSAI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9848776</text:p>
          </table:table-cell>
          <table:table-cell office:value-type="string">
            <text:p>Maryam   Mohsi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9966933</text:p>
          </table:table-cell>
          <table:table-cell office:value-type="string">
            <text:p>Dania   Zees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89969853</text:p>
          </table:table-cell>
          <table:table-cell office:value-type="string">
            <text:p>Muhammad   Husai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469983</text:p>
          </table:table-cell>
          <table:table-cell office:value-type="string">
            <text:p>Yuzarsif   -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652894</text:p>
          </table:table-cell>
          <table:table-cell office:value-type="string">
            <text:p>EMAAN    JAMEEL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727050</text:p>
          </table:table-cell>
          <table:table-cell office:value-type="string">
            <text:p>Rayyan Obaid   K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72705O</text:p>
          </table:table-cell>
          <table:table-cell office:value-type="string">
            <text:p>Rayyan Obaid   K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755900</text:p>
          </table:table-cell>
          <table:table-cell office:value-type="string">
            <text:p>Hamdan Abdul Waris   Wars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841224</text:p>
          </table:table-cell>
          <table:table-cell office:value-type="string">
            <text:p>Raimah   Alv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856651</text:p>
          </table:table-cell>
          <table:table-cell office:value-type="string">
            <text:p>AMAL ADEEL   AZAD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918385</text:p>
          </table:table-cell>
          <table:table-cell office:value-type="string">
            <text:p>MUHAMMAD HAMZA    HAMZA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967466</text:p>
          </table:table-cell>
          <table:table-cell office:value-type="string">
            <text:p>Hoorain   Humayun K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0976393</text:p>
          </table:table-cell>
          <table:table-cell office:value-type="string">
            <text:p>Ammar   Abdullah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004582</text:p>
          </table:table-cell>
          <table:table-cell office:value-type="string">
            <text:p>Ayzal   Irf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129652</text:p>
          </table:table-cell>
          <table:table-cell office:value-type="string">
            <text:p>IMAD    K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149239</text:p>
          </table:table-cell>
          <table:table-cell office:value-type="string">
            <text:p>KHAWLAH   MENHAJ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169765</text:p>
          </table:table-cell>
          <table:table-cell office:value-type="string">
            <text:p>Syed Usman   Al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188906</text:p>
          </table:table-cell>
          <table:table-cell office:value-type="string">
            <text:p>AbdulMoiz   Mustafa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232134</text:p>
          </table:table-cell>
          <table:table-cell office:value-type="string">
            <text:p>Mahnoor    Sharjil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275323</text:p>
          </table:table-cell>
          <table:table-cell office:value-type="string">
            <text:p>ABDUL AHAD   AHAD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370868</text:p>
          </table:table-cell>
          <table:table-cell office:value-type="string">
            <text:p>Musa   Mussayyab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401341</text:p>
          </table:table-cell>
          <table:table-cell office:value-type="string">
            <text:p>Yousef Adn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483216</text:p>
          </table:table-cell>
          <table:table-cell office:value-type="string">
            <text:p>Armish    Fah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486649</text:p>
          </table:table-cell>
          <table:table-cell office:value-type="string">
            <text:p>Jannat   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495640</text:p>
          </table:table-cell>
          <table:table-cell office:value-type="string">
            <text:p>Imaan   GHULAM MURTAZA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585575</text:p>
          </table:table-cell>
          <table:table-cell office:value-type="string">
            <text:p>USWA MURTAZA KHAN   K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668527</text:p>
          </table:table-cell>
          <table:table-cell office:value-type="string">
            <text:p>REHAM   MURTAZA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810814</text:p>
          </table:table-cell>
          <table:table-cell office:value-type="string">
            <text:p>Zoha   Nasir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892846</text:p>
          </table:table-cell>
          <table:table-cell office:value-type="string">
            <text:p>HASAN   HAS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912222</text:p>
          </table:table-cell>
          <table:table-cell office:value-type="string">
            <text:p>NA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922270</text:p>
          </table:table-cell>
          <table:table-cell office:value-type="string">
            <text:p>Rahma   Usama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977498</text:p>
          </table:table-cell>
          <table:table-cell office:value-type="string">
            <text:p>MOHAMMED    OMAR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1993370</text:p>
          </table:table-cell>
          <table:table-cell office:value-type="string">
            <text:p>HASSAN   MUHAMMAD RE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082454</text:p>
          </table:table-cell>
          <table:table-cell office:value-type="string">
            <text:p>Abrish   Aqeel</text:p>
          </table:table-cell>
          <table:table-cell office:value-type="string">
            <text:p>Y3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082462</text:p>
          </table:table-cell>
          <table:table-cell office:value-type="string">
            <text:p>Areesha Aqeel   Aqeel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241456</text:p>
          </table:table-cell>
          <table:table-cell office:value-type="string">
            <text:p>Hamza   K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303736</text:p>
          </table:table-cell>
          <table:table-cell office:value-type="string">
            <text:p>Izhaan   Haseeb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347708</text:p>
          </table:table-cell>
          <table:table-cell office:value-type="string">
            <text:p>Ahmed   Omer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351156</text:p>
          </table:table-cell>
          <table:table-cell office:value-type="string">
            <text:p>Elaf   Abdulaziz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487059</text:p>
          </table:table-cell>
          <table:table-cell office:value-type="string">
            <text:p>Fatir   K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634668</text:p>
          </table:table-cell>
          <table:table-cell office:value-type="string">
            <text:p>Khadijah   Saqib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737594</text:p>
          </table:table-cell>
          <table:table-cell office:value-type="string">
            <text:p>KHADIJA UMAIR   UMAIR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2807462</text:p>
          </table:table-cell>
          <table:table-cell office:value-type="string">
            <text:p>KHAWLAH   SIDDIQU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3505958</text:p>
          </table:table-cell>
          <table:table-cell office:value-type="string">
            <text:p>Abdullah   Habib</text:p>
          </table:table-cell>
          <table:table-cell office:value-type="string">
            <text:p>Y10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3505966</text:p>
          </table:table-cell>
          <table:table-cell office:value-type="string">
            <text:p>Asadullah   Habib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3505975</text:p>
          </table:table-cell>
          <table:table-cell office:value-type="string">
            <text:p>Ayan    Habib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3513085</text:p>
          </table:table-cell>
          <table:table-cell office:value-type="string">
            <text:p>Momin   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3622605</text:p>
          </table:table-cell>
          <table:table-cell office:value-type="string">
            <text:p>Maira Mohsin Mansoor   Qazi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Yes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3986927</text:p>
          </table:table-cell>
          <table:table-cell office:value-type="string">
            <text:p>Subayyal    bhullar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4031210</text:p>
          </table:table-cell>
          <table:table-cell office:value-type="string">
            <text:p>IRSA   FAH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4085232</text:p>
          </table:table-cell>
          <table:table-cell office:value-type="string">
            <text:p>Azlan   Abid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4227818</text:p>
          </table:table-cell>
          <table:table-cell office:value-type="string">
            <text:p>Ammar   Abdul Basit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4397058</text:p>
          </table:table-cell>
          <table:table-cell office:value-type="string">
            <text:p>Ameera    Waqas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4539675</text:p>
          </table:table-cell>
          <table:table-cell office:value-type="string">
            <text:p>Hamza   Yasi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4628040</text:p>
          </table:table-cell>
          <table:table-cell office:value-type="string">
            <text:p>Ifrah Hamza    Ahme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4915081</text:p>
          </table:table-cell>
          <table:table-cell office:value-type="string">
            <text:p>abdulaziz   mohsi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4992106</text:p>
          </table:table-cell>
          <table:table-cell office:value-type="string">
            <text:p>Muhammad   Mustafa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5004070</text:p>
          </table:table-cell>
          <table:table-cell office:value-type="string">
            <text:p>Anaya Qasim   Muhammad Qasim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5111631</text:p>
          </table:table-cell>
          <table:table-cell office:value-type="string">
            <text:p>MUJTABA   AHM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6422979</text:p>
          </table:table-cell>
          <table:table-cell office:value-type="string">
            <text:p>SHAHAAN   AHME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6776481</text:p>
          </table:table-cell>
          <table:table-cell office:value-type="string">
            <text:p>Nofil   Salman Ali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7142550</text:p>
          </table:table-cell>
          <table:table-cell office:value-type="string">
            <text:p>Muhammad   Izha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7185237</text:p>
          </table:table-cell>
          <table:table-cell office:value-type="string">
            <text:p>Shahzain    Humayu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7587894</text:p>
          </table:table-cell>
          <table:table-cell office:value-type="string">
            <text:p>KHADIJA ZAHID   ZAHID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7757084</text:p>
          </table:table-cell>
          <table:table-cell office:value-type="string">
            <text:p>arwa unaib   unaib arif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8233440</text:p>
          </table:table-cell>
          <table:table-cell office:value-type="string">
            <text:p>Nafiah   Kashaf</text:p>
          </table:table-cell>
          <table:table-cell office:value-type="string">
            <text:p>Y3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8422621</text:p>
          </table:table-cell>
          <table:table-cell office:value-type="string">
            <text:p>Manal Ahmad   Ahm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8672893</text:p>
          </table:table-cell>
          <table:table-cell office:value-type="string">
            <text:p>Mariam   Khuram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8885026</text:p>
          </table:table-cell>
          <table:table-cell office:value-type="string">
            <text:p>Muhammad   Zai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9067839</text:p>
          </table:table-cell>
          <table:table-cell office:value-type="string">
            <text:p>Ayzal Khuram    k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9282297</text:p>
          </table:table-cell>
          <table:table-cell office:value-type="string">
            <text:p>Zainab   Talal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9636567</text:p>
          </table:table-cell>
          <table:table-cell office:value-type="string">
            <text:p>Ali   Arsal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9658132</text:p>
          </table:table-cell>
          <table:table-cell office:value-type="string">
            <text:p>Minha   Mohsii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99795504</text:p>
          </table:table-cell>
          <table:table-cell office:value-type="string">
            <text:p>SHAHZAIN   AHM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0000000</text:p>
          </table:table-cell>
          <table:table-cell office:value-type="string">
            <text:p>ABDULLAH   CHISHTI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0000002</text:p>
          </table:table-cell>
          <table:table-cell office:value-type="string">
            <text:p>FATIMA   CHISHTI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0000003</text:p>
          </table:table-cell>
          <table:table-cell office:value-type="string">
            <text:p>NARMEEN   CHISHTI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0152943</text:p>
          </table:table-cell>
          <table:table-cell office:value-type="string">
            <text:p>IBRAHEEM MUHAMMAD ALMAS   K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1367342</text:p>
          </table:table-cell>
          <table:table-cell office:value-type="string">
            <text:p>Hajra   Zohaib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1663617</text:p>
          </table:table-cell>
          <table:table-cell office:value-type="string">
            <text:p>Fares   Muhamm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2156677
</text:p>
          </table:table-cell>
          <table:table-cell office:value-type="string">
            <text:p>Muhammad Ali   Kashif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2490101</text:p>
          </table:table-cell>
          <table:table-cell office:value-type="string">
            <text:p>Taimoor   Waqar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2719807</text:p>
          </table:table-cell>
          <table:table-cell office:value-type="string">
            <text:p>Manha   Noor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3270825</text:p>
          </table:table-cell>
          <table:table-cell office:value-type="string">
            <text:p>Omer   Ib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3323681</text:p>
          </table:table-cell>
          <table:table-cell office:value-type="string">
            <text:p>YASSEN   MOHAMMAD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4385342</text:p>
          </table:table-cell>
          <table:table-cell office:value-type="string">
            <text:p>Abdul hadi   Sult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5369807</text:p>
          </table:table-cell>
          <table:table-cell office:value-type="string">
            <text:p>Unaisa   Kh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6053277</text:p>
          </table:table-cell>
          <table:table-cell office:value-type="string">
            <text:p>MOHAMMAD BIN   IMR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6621727</text:p>
          </table:table-cell>
          <table:table-cell office:value-type="string">
            <text:p>Muhammad Hadi   Kh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6650834</text:p>
          </table:table-cell>
          <table:table-cell office:value-type="string">
            <text:p>HASHIM BURHAN ABID SHAH   SYED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6776737</text:p>
          </table:table-cell>
          <table:table-cell office:value-type="string">
            <text:p>Ayat   Ali Malik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7019319</text:p>
          </table:table-cell>
          <table:table-cell office:value-type="string">
            <text:p>Abdulhadi   Yasee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7164503</text:p>
          </table:table-cell>
          <table:table-cell office:value-type="string">
            <text:p>LOBAINA   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7601592</text:p>
          </table:table-cell>
          <table:table-cell office:value-type="string">
            <text:p>Sara   Ahmad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9252157</text:p>
          </table:table-cell>
          <table:table-cell office:value-type="string">
            <text:p>dalida ahmed gamil   hafez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9252165</text:p>
          </table:table-cell>
          <table:table-cell office:value-type="string">
            <text:p>sam ahmed gamil mohamed hafez   hafez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09275778</text:p>
          </table:table-cell>
          <table:table-cell office:value-type="string">
            <text:p>Malik    Muhammad Bin Adil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0622299</text:p>
          </table:table-cell>
          <table:table-cell office:value-type="string">
            <text:p>Hamdan   Kh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1204890</text:p>
          </table:table-cell>
          <table:table-cell office:value-type="string">
            <text:p>Muhammad Muaz   Abuzar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1371277</text:p>
          </table:table-cell>
          <table:table-cell office:value-type="string">
            <text:p>NA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2025724</text:p>
          </table:table-cell>
          <table:table-cell office:value-type="string">
            <text:p>Arfa   Shahbaz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2544749</text:p>
          </table:table-cell>
          <table:table-cell office:value-type="string">
            <text:p>Alaa   Shalaby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2821295</text:p>
          </table:table-cell>
          <table:table-cell office:value-type="string">
            <text:p>NA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3527248</text:p>
          </table:table-cell>
          <table:table-cell office:value-type="string">
            <text:p>MIR SHAHZAIN   ALI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3951224</text:p>
          </table:table-cell>
          <table:table-cell office:value-type="string">
            <text:p>Nawal   Ahmed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6383920</text:p>
          </table:table-cell>
          <table:table-cell office:value-type="string">
            <text:p>Mirha   Usm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6396377</text:p>
          </table:table-cell>
          <table:table-cell office:value-type="string">
            <text:p>Muhammad Arham   Arshad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6674211</text:p>
          </table:table-cell>
          <table:table-cell office:value-type="string">
            <text:p>Zirwa Yousuf   Makba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6745953</text:p>
          </table:table-cell>
          <table:table-cell office:value-type="string">
            <text:p>Hamdan   Waqas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17298366</text:p>
          </table:table-cell>
          <table:table-cell office:value-type="string">
            <text:p>Aroush   Aamir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0700127</text:p>
          </table:table-cell>
          <table:table-cell office:value-type="string">
            <text:p>HALEEMA   GHULAM MEHBOOB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1092680</text:p>
          </table:table-cell>
          <table:table-cell office:value-type="string">
            <text:p>HUSSAIN   MUHAMMAD REH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1213393</text:p>
          </table:table-cell>
          <table:table-cell office:value-type="string">
            <text:p>Aaliyah   Farooq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1636148</text:p>
          </table:table-cell>
          <table:table-cell office:value-type="string">
            <text:p>Noora   Farh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2210730</text:p>
          </table:table-cell>
          <table:table-cell office:value-type="string">
            <text:p>Emaan   Karim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2210745</text:p>
          </table:table-cell>
          <table:table-cell office:value-type="string">
            <text:p>Eshaal    Karim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2841747</text:p>
          </table:table-cell>
          <table:table-cell office:value-type="string">
            <text:p>Abdullah   Mohammad Bilal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2854443</text:p>
          </table:table-cell>
          <table:table-cell office:value-type="string">
            <text:p>Anabia   Abdul Wahab Afzal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3059505</text:p>
          </table:table-cell>
          <table:table-cell office:value-type="string">
            <text:p>Talal   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5942070</text:p>
          </table:table-cell>
          <table:table-cell office:value-type="string">
            <text:p>ADAM   ATTIA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7106419</text:p>
          </table:table-cell>
          <table:table-cell office:value-type="string">
            <text:p>ANAMTA ALMAS   ALMAS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7231589</text:p>
          </table:table-cell>
          <table:table-cell office:value-type="string">
            <text:p>Ahmed Mohamed Taher Mohamed Elghonimi   Elghonimi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7656959</text:p>
          </table:table-cell>
          <table:table-cell office:value-type="string">
            <text:p>Unaisa   Rahmat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9005312</text:p>
          </table:table-cell>
          <table:table-cell office:value-type="string">
            <text:p>ALEEHA FATIMA   ASIF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9409761</text:p>
          </table:table-cell>
          <table:table-cell office:value-type="string">
            <text:p>Muhammad Umar   Yasir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0353594</text:p>
          </table:table-cell>
          <table:table-cell office:value-type="string">
            <text:p>MOOSA   K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0618434</text:p>
          </table:table-cell>
          <table:table-cell office:value-type="string">
            <text:p>HESHAM AHMED HESHAM HANAFY   ALY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0877535</text:p>
          </table:table-cell>
          <table:table-cell office:value-type="string">
            <text:p>Mohammad Haroon   Ishaq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1427836</text:p>
          </table:table-cell>
          <table:table-cell office:value-type="string">
            <text:p>osaid   awais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1446208</text:p>
          </table:table-cell>
          <table:table-cell office:value-type="string">
            <text:p>abeer    awais</text:p>
          </table:table-cell>
          <table:table-cell office:value-type="string">
            <text:p>Y7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1542178</text:p>
          </table:table-cell>
          <table:table-cell office:value-type="string">
            <text:p>Irzah   awais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2513013</text:p>
          </table:table-cell>
          <table:table-cell office:value-type="string">
            <text:p>MUSFIRAH   UMER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3018392</text:p>
          </table:table-cell>
          <table:table-cell office:value-type="string">
            <text:p>MOHAMMED AHMED HESHAM HANAFY    ALY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3218307</text:p>
          </table:table-cell>
          <table:table-cell office:value-type="string">
            <text:p>HAMZA   AHMED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4812454</text:p>
          </table:table-cell>
          <table:table-cell office:value-type="string">
            <text:p>HEBA   HUSSAIN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7427052</text:p>
          </table:table-cell>
          <table:table-cell office:value-type="string">
            <text:p>Minsa   Zainab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38803848</text:p>
          </table:table-cell>
          <table:table-cell office:value-type="string">
            <text:p>Aaima   --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1257305</text:p>
          </table:table-cell>
          <table:table-cell office:value-type="string">
            <text:p>Muhammad Abdur   Rahman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1257313</text:p>
          </table:table-cell>
          <table:table-cell office:value-type="string">
            <text:p>Muhammad Abdul   Manan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1257321</text:p>
          </table:table-cell>
          <table:table-cell office:value-type="string">
            <text:p>Muhammad   Abdullah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2351212</text:p>
          </table:table-cell>
          <table:table-cell office:value-type="string">
            <text:p>MUHAMMAD   ALI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2351457</text:p>
          </table:table-cell>
          <table:table-cell office:value-type="string">
            <text:p>AYESHA   AAMIR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2625955</text:p>
          </table:table-cell>
          <table:table-cell office:value-type="string">
            <text:p>LALEEN   NAWAZ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3518209</text:p>
          </table:table-cell>
          <table:table-cell office:value-type="string">
            <text:p>Zubaida    Bilal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3599670</text:p>
          </table:table-cell>
          <table:table-cell office:value-type="string">
            <text:p>Zainab Bilal   Saeed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3876512</text:p>
          </table:table-cell>
          <table:table-cell office:value-type="string">
            <text:p>Syed Wahaj   Hasan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4928936</text:p>
          </table:table-cell>
          <table:table-cell office:value-type="string">
            <text:p>MIRAAL   WAQAS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5634020</text:p>
          </table:table-cell>
          <table:table-cell office:value-type="string">
            <text:p>Muhammad Zarrar   Kh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6643393</text:p>
          </table:table-cell>
          <table:table-cell office:value-type="string">
            <text:p>Izzah    Tariq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7085387</text:p>
          </table:table-cell>
          <table:table-cell office:value-type="string">
            <text:p>HEBAH   ALMEKHLAFI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7638909</text:p>
          </table:table-cell>
          <table:table-cell office:value-type="string">
            <text:p>Syeda Farwa   Hasan</text:p>
          </table:table-cell>
          <table:table-cell office:value-type="string">
            <text:p>Y10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8572193</text:p>
          </table:table-cell>
          <table:table-cell office:value-type="string">
            <text:p>Muhammad   Aff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9174783</text:p>
          </table:table-cell>
          <table:table-cell office:value-type="string">
            <text:p>Horia Rehman    Rehman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49322549</text:p>
          </table:table-cell>
          <table:table-cell office:value-type="string">
            <text:p>Tooba    Naveed</text:p>
          </table:table-cell>
          <table:table-cell office:value-type="string">
            <text:p>Y9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2707693</text:p>
          </table:table-cell>
          <table:table-cell office:value-type="string">
            <text:p>MUHAMMAD   MUHAMMAD IRF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3384330</text:p>
          </table:table-cell>
          <table:table-cell office:value-type="string">
            <text:p>Muhammad    Umar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3847894</text:p>
          </table:table-cell>
          <table:table-cell office:value-type="string">
            <text:p>Syeda Zoha Wasti   Wast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4063798</text:p>
          </table:table-cell>
          <table:table-cell office:value-type="string">
            <text:p>Zainab Fatima    Muhammad Rizwan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4063806</text:p>
          </table:table-cell>
          <table:table-cell office:value-type="string">
            <text:p>Maryam   Fatima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4176301</text:p>
          </table:table-cell>
          <table:table-cell office:value-type="string">
            <text:p>ABEERA   QURB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4176319</text:p>
          </table:table-cell>
          <table:table-cell office:value-type="string">
            <text:p>ABEERHA   QURB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4332173</text:p>
          </table:table-cell>
          <table:table-cell office:value-type="string">
            <text:p>Syed    Abbas Hasan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4764023</text:p>
          </table:table-cell>
          <table:table-cell office:value-type="string">
            <text:p>HAZIM   BHAGAT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6368203</text:p>
          </table:table-cell>
          <table:table-cell office:value-type="string">
            <text:p>Manahil   Ahs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6699887</text:p>
          </table:table-cell>
          <table:table-cell office:value-type="string">
            <text:p>Abdul Rehman   Qureshi</text:p>
          </table:table-cell>
          <table:table-cell office:value-type="string">
            <text:p>Y10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8619645</text:p>
          </table:table-cell>
          <table:table-cell office:value-type="string">
            <text:p>MARIA USMAN   USMAN MALIK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58898449</text:p>
          </table:table-cell>
          <table:table-cell office:value-type="string">
            <text:p>MINAHIL   ALI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60848216</text:p>
          </table:table-cell>
          <table:table-cell office:value-type="string">
            <text:p>Ashmaan Mustafa   SYED</text:p>
          </table:table-cell>
          <table:table-cell office:value-type="string">
            <text:p>Y3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66121741</text:p>
          </table:table-cell>
          <table:table-cell office:value-type="string">
            <text:p>Ranain   Naeem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68357047</text:p>
          </table:table-cell>
          <table:table-cell office:value-type="string">
            <text:p>Moattar   Zahra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69067082</text:p>
          </table:table-cell>
          <table:table-cell office:value-type="string">
            <text:p>Alizeh   Ali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0730214</text:p>
          </table:table-cell>
          <table:table-cell office:value-type="string">
            <text:p>Muneezy   Eman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0730222</text:p>
          </table:table-cell>
          <table:table-cell office:value-type="string">
            <text:p>Rahima   Shoaib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1248109</text:p>
          </table:table-cell>
          <table:table-cell office:value-type="string">
            <text:p>AbdulMomin   Rizwan Mohammad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1752365</text:p>
          </table:table-cell>
          <table:table-cell office:value-type="string">
            <text:p>Muhammad Abdul rafay   Saddiquee</text:p>
          </table:table-cell>
          <table:table-cell office:value-type="string">
            <text:p>Y8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1752373</text:p>
          </table:table-cell>
          <table:table-cell office:value-type="string">
            <text:p>Muhammad Mahad   Siddiqui</text:p>
          </table:table-cell>
          <table:table-cell office:value-type="string">
            <text:p>Y7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1752381</text:p>
          </table:table-cell>
          <table:table-cell office:value-type="string">
            <text:p>Ahmad Bilal   Siddiqui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1752399</text:p>
          </table:table-cell>
          <table:table-cell office:value-type="string">
            <text:p>Hamid Bilal   Siddiqui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5135849</text:p>
          </table:table-cell>
          <table:table-cell office:value-type="string">
            <text:p>NA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5242751</text:p>
          </table:table-cell>
          <table:table-cell office:value-type="string">
            <text:p>Amal Fatima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6087411</text:p>
          </table:table-cell>
          <table:table-cell office:value-type="string">
            <text:p>Mirha   Nawaf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7412378</text:p>
          </table:table-cell>
          <table:table-cell office:value-type="string">
            <text:p>Arshmaan Muhammad   Umer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7502863</text:p>
          </table:table-cell>
          <table:table-cell office:value-type="string">
            <text:p>ZARTASHA ASIM   KH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7502871</text:p>
          </table:table-cell>
          <table:table-cell office:value-type="string">
            <text:p>ZOYA ASIM   KH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9428521</text:p>
          </table:table-cell>
          <table:table-cell office:value-type="string">
            <text:p>TAHREEM   FAW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9512193</text:p>
          </table:table-cell>
          <table:table-cell office:value-type="string">
            <text:p>HALEEMA   SADIA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9512194</text:p>
          </table:table-cell>
          <table:table-cell office:value-type="string">
            <text:p>SOWAIBA   FAHEEM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9512195</text:p>
          </table:table-cell>
          <table:table-cell office:value-type="string">
            <text:p>MUHAMMAD HASNAIN   ALI</text:p>
          </table:table-cell>
          <table:table-cell office:value-type="string">
            <text:p>Y2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79512196</text:p>
          </table:table-cell>
          <table:table-cell office:value-type="string">
            <text:p>HOOR   UL AYE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0912232</text:p>
          </table:table-cell>
          <table:table-cell office:value-type="string">
            <text:p>HOZAAN FAHAD   CHAUDHARY</text:p>
          </table:table-cell>
          <table:table-cell office:value-type="string">
            <text:p>Y10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0912828</text:p>
          </table:table-cell>
          <table:table-cell office:value-type="string">
            <text:p>MOEEZ FAHAD   CHAUDHARY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1271406</text:p>
          </table:table-cell>
          <table:table-cell office:value-type="string">
            <text:p>Adan   Fahad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1535945</text:p>
          </table:table-cell>
          <table:table-cell office:value-type="string">
            <text:p>Aun   Raza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2119760</text:p>
          </table:table-cell>
          <table:table-cell office:value-type="string">
            <text:p>Ahmad   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4243156</text:p>
          </table:table-cell>
          <table:table-cell office:value-type="string">
            <text:p>aban   amjad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4969956</text:p>
          </table:table-cell>
          <table:table-cell office:value-type="string">
            <text:p>MUHAMMAD MAAIZ   ALI SYED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4970997</text:p>
          </table:table-cell>
          <table:table-cell office:value-type="string">
            <text:p>Zunaira Saad   Ahmed</text:p>
          </table:table-cell>
          <table:table-cell office:value-type="string">
            <text:p>Y10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6500388</text:p>
          </table:table-cell>
          <table:table-cell office:value-type="string">
            <text:p>Mirha   Danial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7594900</text:p>
          </table:table-cell>
          <table:table-cell office:value-type="string">
            <text:p>MUHAMMAD ZAIM TALAL   CHAUDHARY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7946492</text:p>
          </table:table-cell>
          <table:table-cell office:value-type="string">
            <text:p>Amaya    K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8234127</text:p>
          </table:table-cell>
          <table:table-cell office:value-type="string">
            <text:p>Zahra Zeeshan   Zeeshan Akbar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8982302</text:p>
          </table:table-cell>
          <table:table-cell office:value-type="string">
            <text:p>BILAL   WASEEM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8982310</text:p>
          </table:table-cell>
          <table:table-cell office:value-type="string">
            <text:p>kIHZAR   WASEEM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8982328</text:p>
          </table:table-cell>
          <table:table-cell office:value-type="string">
            <text:p>NIMRAH   WASEEM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8984480</text:p>
          </table:table-cell>
          <table:table-cell office:value-type="string">
            <text:p>ZAIN   ALI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8984506</text:p>
          </table:table-cell>
          <table:table-cell office:value-type="string">
            <text:p>HASNAIN   ALI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8984514</text:p>
          </table:table-cell>
          <table:table-cell office:value-type="string">
            <text:p>ZULQARNAIN   AL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9205702</text:p>
          </table:table-cell>
          <table:table-cell office:value-type="string">
            <text:p>MOHSEN   JAWAD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89885058</text:p>
          </table:table-cell>
          <table:table-cell office:value-type="string">
            <text:p>Manahil   Mohsi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0429920</text:p>
          </table:table-cell>
          <table:table-cell office:value-type="string">
            <text:p>Jannat Ul Mava   -</text:p>
          </table:table-cell>
          <table:table-cell office:value-type="string">
            <text:p>Y9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0429939</text:p>
          </table:table-cell>
          <table:table-cell office:value-type="string">
            <text:p>Abdullah    Jawad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2198358</text:p>
          </table:table-cell>
          <table:table-cell office:value-type="string">
            <text:p>Muhammad Shayan   Siddiqui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2198499</text:p>
          </table:table-cell>
          <table:table-cell office:value-type="string">
            <text:p>Abdullah    Siddiqui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3189415</text:p>
          </table:table-cell>
          <table:table-cell office:value-type="string">
            <text:p>Afaf   Saud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3262329</text:p>
          </table:table-cell>
          <table:table-cell office:value-type="string">
            <text:p>Aleena   Saud</text:p>
          </table:table-cell>
          <table:table-cell office:value-type="string">
            <text:p>Y7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4924140</text:p>
          </table:table-cell>
          <table:table-cell office:value-type="string">
            <text:p>Muhammad Bin   Muaaz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4924165</text:p>
          </table:table-cell>
          <table:table-cell office:value-type="string">
            <text:p>Hanbal Bin   Muaaz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5307311</text:p>
          </table:table-cell>
          <table:table-cell office:value-type="string">
            <text:p>AFRA SOHAIL   KHATTAK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6305678</text:p>
          </table:table-cell>
          <table:table-cell office:value-type="string">
            <text:p>MIRHA   FATIMA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6429494</text:p>
          </table:table-cell>
          <table:table-cell office:value-type="string">
            <text:p>Muhammad   Iza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6910147</text:p>
          </table:table-cell>
          <table:table-cell office:value-type="string">
            <text:p>Anas   Kashif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6910154</text:p>
          </table:table-cell>
          <table:table-cell office:value-type="string">
            <text:p>Omar Muhammad   Kashif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7708110</text:p>
          </table:table-cell>
          <table:table-cell office:value-type="string">
            <text:p>SYEDA FATEMAH   Re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98406947</text:p>
          </table:table-cell>
          <table:table-cell office:value-type="string">
            <text:p>Afan bin Usman   Ghan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0695687</text:p>
          </table:table-cell>
          <table:table-cell office:value-type="string">
            <text:p>muhammad musa shahbaz   shahbaz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2539633</text:p>
          </table:table-cell>
          <table:table-cell office:value-type="string">
            <text:p>ZAHRA   NIL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2580819</text:p>
          </table:table-cell>
          <table:table-cell office:value-type="string">
            <text:p>Ahmed   Farhan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2653905</text:p>
          </table:table-cell>
          <table:table-cell office:value-type="string">
            <text:p>AROUSH   FATIMA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2751247</text:p>
          </table:table-cell>
          <table:table-cell office:value-type="string">
            <text:p>Salamah    Naeem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2751402</text:p>
          </table:table-cell>
          <table:table-cell office:value-type="string">
            <text:p>Humaid Naeem   Naeem Ullah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2751436</text:p>
          </table:table-cell>
          <table:table-cell office:value-type="string">
            <text:p>Hassan Naeem    Naeem Ullah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2877447</text:p>
          </table:table-cell>
          <table:table-cell office:value-type="string">
            <text:p>HOORAIN   UMAR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2877466</text:p>
          </table:table-cell>
          <table:table-cell office:value-type="string">
            <text:p>HAZIQ    UMAR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084068</text:p>
          </table:table-cell>
          <table:table-cell office:value-type="string">
            <text:p>Saleha   Ammar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084076</text:p>
          </table:table-cell>
          <table:table-cell office:value-type="string">
            <text:p>Ayesha   Ammar</text:p>
          </table:table-cell>
          <table:table-cell office:value-type="string">
            <text:p>Y10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492592</text:p>
          </table:table-cell>
          <table:table-cell office:value-type="string">
            <text:p>MUHAMMAD MOOSA   MOHSI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501699</text:p>
          </table:table-cell>
          <table:table-cell office:value-type="string">
            <text:p>Kashmala Kashif   Rehan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501954</text:p>
          </table:table-cell>
          <table:table-cell office:value-type="string">
            <text:p>Arham Kashif   Re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511656</text:p>
          </table:table-cell>
          <table:table-cell office:value-type="string">
            <text:p>Sarah   Khan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511755</text:p>
          </table:table-cell>
          <table:table-cell office:value-type="string">
            <text:p>Muhammad Umar   Khan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511912</text:p>
          </table:table-cell>
          <table:table-cell office:value-type="string">
            <text:p>Muhammad Yousuf   Khan</text:p>
          </table:table-cell>
          <table:table-cell office:value-type="string">
            <text:p>Y5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512316</text:p>
          </table:table-cell>
          <table:table-cell office:value-type="string">
            <text:p>Muhammad Saud   Khan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631256</text:p>
          </table:table-cell>
          <table:table-cell office:value-type="string">
            <text:p>ABUZAR ALI KHAN   KHAN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655115</text:p>
          </table:table-cell>
          <table:table-cell office:value-type="string">
            <text:p>TALEEN    HAMMAD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657525</text:p>
          </table:table-cell>
          <table:table-cell office:value-type="string">
            <text:p>MAHAD   UNEEB</text:p>
          </table:table-cell>
          <table:table-cell office:value-type="string">
            <text:p>Y5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3799178</text:p>
          </table:table-cell>
          <table:table-cell office:value-type="string">
            <text:p>ABRISH   FAISAL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168183</text:p>
          </table:table-cell>
          <table:table-cell office:value-type="string">
            <text:p>AMINA TAHIR   CHOUDHARY</text:p>
          </table:table-cell>
          <table:table-cell office:value-type="string">
            <text:p>Y5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168506</text:p>
          </table:table-cell>
          <table:table-cell office:value-type="string">
            <text:p>MUHAMMAD TAHIR   CHAUDHARY</text:p>
          </table:table-cell>
          <table:table-cell office:value-type="string">
            <text:p>Y2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169082</text:p>
          </table:table-cell>
          <table:table-cell office:value-type="string">
            <text:p>AHMED TAHIR   CHOUDHARY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180808</text:p>
          </table:table-cell>
          <table:table-cell office:value-type="string">
            <text:p>Safa   Muhammad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183919</text:p>
          </table:table-cell>
          <table:table-cell office:value-type="string">
            <text:p>Amina    Muhammad Waqas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183992</text:p>
          </table:table-cell>
          <table:table-cell office:value-type="string">
            <text:p>Khadija    Muhammad Waqas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184198</text:p>
          </table:table-cell>
          <table:table-cell office:value-type="string">
            <text:p>Abdullah    Muhammad Waqas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400784</text:p>
          </table:table-cell>
          <table:table-cell office:value-type="string">
            <text:p>KHADIJA   MASROOR AHMAD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4401147</text:p>
          </table:table-cell>
          <table:table-cell office:value-type="string">
            <text:p>SAKINA   MASROOR AHMAD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121637</text:p>
          </table:table-cell>
          <table:table-cell office:value-type="string">
            <text:p>OMER   MOHAMMAD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144423</text:p>
          </table:table-cell>
          <table:table-cell office:value-type="string">
            <text:p>anas   waqas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144688</text:p>
          </table:table-cell>
          <table:table-cell office:value-type="string">
            <text:p>irhaa   waqas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258272</text:p>
          </table:table-cell>
          <table:table-cell office:value-type="string">
            <text:p>Rania    Tariq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258462</text:p>
          </table:table-cell>
          <table:table-cell office:value-type="string">
            <text:p>Mohammed Moosa    Tariq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259825</text:p>
          </table:table-cell>
          <table:table-cell office:value-type="string">
            <text:p>Anaaiza    Tariq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290820</text:p>
          </table:table-cell>
          <table:table-cell office:value-type="string">
            <text:p>Sohaina   Arsl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340047</text:p>
          </table:table-cell>
          <table:table-cell office:value-type="string">
            <text:p>Meer   Faizan</text:p>
          </table:table-cell>
          <table:table-cell office:value-type="string">
            <text:p>Y2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5340054</text:p>
          </table:table-cell>
          <table:table-cell office:value-type="string">
            <text:p>Fiza   -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6441174</text:p>
          </table:table-cell>
          <table:table-cell office:value-type="string">
            <text:p>Haniya   Khan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6441181</text:p>
          </table:table-cell>
          <table:table-cell office:value-type="string">
            <text:p>Sarim Ali   Khan</text:p>
          </table:table-cell>
          <table:table-cell office:value-type="string">
            <text:p>Y2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6673040</text:p>
          </table:table-cell>
          <table:table-cell office:value-type="string">
            <text:p>ZARNISH   SHAIKH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120892</text:p>
          </table:table-cell>
          <table:table-cell office:value-type="string">
            <text:p>MAIDAH   AL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143746</text:p>
          </table:table-cell>
          <table:table-cell office:value-type="string">
            <text:p>Aliyah   Panhwar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150155</text:p>
          </table:table-cell>
          <table:table-cell office:value-type="string">
            <text:p>Emaan Farhan Siddiqi   Siddiqi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400864</text:p>
          </table:table-cell>
          <table:table-cell office:value-type="string">
            <text:p>MUHAMMAD HASNAIN   BASHIR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400872</text:p>
          </table:table-cell>
          <table:table-cell office:value-type="string">
            <text:p>HAFSA   BASHIR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406994</text:p>
          </table:table-cell>
          <table:table-cell office:value-type="string">
            <text:p>Sataish   Khan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413347</text:p>
          </table:table-cell>
          <table:table-cell office:value-type="string">
            <text:p>Muhammad Taha   Saif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413495</text:p>
          </table:table-cell>
          <table:table-cell office:value-type="string">
            <text:p>Muhammad Abdullah   Saif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413628</text:p>
          </table:table-cell>
          <table:table-cell office:value-type="string">
            <text:p>Fatima   Saif</text:p>
          </table:table-cell>
          <table:table-cell office:value-type="string">
            <text:p>Y3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766420</text:p>
          </table:table-cell>
          <table:table-cell office:value-type="string">
            <text:p>Yahiya Amjad    khattak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852288</text:p>
          </table:table-cell>
          <table:table-cell office:value-type="string">
            <text:p>Khaula Fatime   Khattak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990617</text:p>
          </table:table-cell>
          <table:table-cell office:value-type="string">
            <text:p>HABBAN ALI   SYED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990757</text:p>
          </table:table-cell>
          <table:table-cell office:value-type="string">
            <text:p>MAHROASH FATIMA   SYEDA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7990880</text:p>
          </table:table-cell>
          <table:table-cell office:value-type="string">
            <text:p>SYED HASSAN   ALI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455958</text:p>
          </table:table-cell>
          <table:table-cell office:value-type="string">
            <text:p>Fasih Ur   Rehman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716136</text:p>
          </table:table-cell>
          <table:table-cell office:value-type="string">
            <text:p>Zaviyar   Sulam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912545</text:p>
          </table:table-cell>
          <table:table-cell office:value-type="string">
            <text:p>Muhammad   Ibrahim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912743</text:p>
          </table:table-cell>
          <table:table-cell office:value-type="string">
            <text:p>Abeeha   Fatima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926271</text:p>
          </table:table-cell>
          <table:table-cell office:value-type="string">
            <text:p>Muhammad   Muhammad</text:p>
          </table:table-cell>
          <table:table-cell office:value-type="string">
            <text:p>Y8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926669</text:p>
          </table:table-cell>
          <table:table-cell office:value-type="string">
            <text:p>Aysha   Gul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926891</text:p>
          </table:table-cell>
          <table:table-cell office:value-type="string">
            <text:p>Memoona   Gul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960833</text:p>
          </table:table-cell>
          <table:table-cell office:value-type="string">
            <text:p>HASHIR NADEEM   MUHAMAMD NADEEM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8962524</text:p>
          </table:table-cell>
          <table:table-cell office:value-type="string">
            <text:p>ABEEHA NADEEM   MUHAMAMD NADEEM</text:p>
          </table:table-cell>
          <table:table-cell office:value-type="string">
            <text:p>Y3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054511</text:p>
          </table:table-cell>
          <table:table-cell office:value-type="string">
            <text:p>SARAH   KASHIF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054628</text:p>
          </table:table-cell>
          <table:table-cell office:value-type="string">
            <text:p>MARYUM   KASHIF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280322</text:p>
          </table:table-cell>
          <table:table-cell office:value-type="string">
            <text:p>Muhammad Hassan   Salman</text:p>
          </table:table-cell>
          <table:table-cell office:value-type="string">
            <text:p>Y2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280553</text:p>
          </table:table-cell>
          <table:table-cell office:value-type="string">
            <text:p>Emaan Salman   Habib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415175</text:p>
          </table:table-cell>
          <table:table-cell office:value-type="string">
            <text:p>ABDUL   HADI</text:p>
          </table:table-cell>
          <table:table-cell office:value-type="string">
            <text:p>Y5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415704</text:p>
          </table:table-cell>
          <table:table-cell office:value-type="string">
            <text:p>INAYA   NADEEM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807587</text:p>
          </table:table-cell>
          <table:table-cell office:value-type="string">
            <text:p>Arwa   Wahaj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807595</text:p>
          </table:table-cell>
          <table:table-cell office:value-type="string">
            <text:p>Ubaan    Wahaj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841032</text:p>
          </table:table-cell>
          <table:table-cell office:value-type="string">
            <text:p>IBRAHIM   AHMED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09936626</text:p>
          </table:table-cell>
          <table:table-cell office:value-type="string">
            <text:p>AMNA   UMAIR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10253086</text:p>
          </table:table-cell>
          <table:table-cell office:value-type="string">
            <text:p>Ahmad   Abdullah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11132677</text:p>
          </table:table-cell>
          <table:table-cell office:value-type="string">
            <text:p>Abdul Ahad   Bin Danish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11224987</text:p>
          </table:table-cell>
          <table:table-cell office:value-type="string">
            <text:p>Aarav    kumar</text:p>
          </table:table-cell>
          <table:table-cell office:value-type="string">
            <text:p>Y3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11305539</text:p>
          </table:table-cell>
          <table:table-cell office:value-type="string">
            <text:p>Divyaan   Dinish kumar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11539483</text:p>
          </table:table-cell>
          <table:table-cell office:value-type="string">
            <text:p>Muhammad Abubakar   Ahmad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611828068</text:p>
          </table:table-cell>
          <table:table-cell office:value-type="string">
            <text:p>Sarim   Tahir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789456142</text:p>
          </table:table-cell>
          <table:table-cell office:value-type="string">
            <text:p>Mian Muhammad   Ehan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789456187</text:p>
          </table:table-cell>
          <table:table-cell office:value-type="string">
            <text:p>Muhammad   Hamdan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878456741</text:p>
          </table:table-cell>
          <table:table-cell office:value-type="string">
            <text:p>Aizah Attiqur    Rehman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009</text:p>
          </table:table-cell>
          <table:table-cell office:value-type="string">
            <text:p>Naba Ahmer   Kh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012</text:p>
          </table:table-cell>
          <table:table-cell office:value-type="string">
            <text:p>MUHAMMAD   SABIH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013</text:p>
          </table:table-cell>
          <table:table-cell office:value-type="string">
            <text:p>MUHAMMAD   HASHIM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037</text:p>
          </table:table-cell>
          <table:table-cell office:value-type="string">
            <text:p>HARAM   FATIMA</text:p>
          </table:table-cell>
          <table:table-cell office:value-type="string">
            <text:p>Y4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041</text:p>
          </table:table-cell>
          <table:table-cell office:value-type="string">
            <text:p>MUHAMMAD   IBRAHIM</text:p>
          </table:table-cell>
          <table:table-cell office:value-type="string">
            <text:p>Y2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099</text:p>
          </table:table-cell>
          <table:table-cell office:value-type="string">
            <text:p>Muhammad   Zaroon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100</text:p>
          </table:table-cell>
          <table:table-cell office:value-type="string">
            <text:p>Muhammad   Riyan</text:p>
          </table:table-cell>
          <table:table-cell office:value-type="string">
            <text:p>Y8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134</text:p>
          </table:table-cell>
          <table:table-cell office:value-type="string">
            <text:p>MARYAM   KHAN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155</text:p>
          </table:table-cell>
          <table:table-cell office:value-type="string">
            <text:p>MIRHA   KHAN</text:p>
          </table:table-cell>
          <table:table-cell office:value-type="string">
            <text:p>P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990</text:p>
          </table:table-cell>
          <table:table-cell office:value-type="string">
            <text:p>MEHAK   JUNAID</text:p>
          </table:table-cell>
          <table:table-cell office:value-type="string">
            <text:p>Y10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992</text:p>
          </table:table-cell>
          <table:table-cell office:value-type="string">
            <text:p>ABDUL REHMAN   JUNAID</text:p>
          </table:table-cell>
          <table:table-cell office:value-type="string">
            <text:p>Y7-B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0993</text:p>
          </table:table-cell>
          <table:table-cell office:value-type="string">
            <text:p>MEERAB   JUNAID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03333</text:p>
          </table:table-cell>
          <table:table-cell office:value-type="string">
            <text:p>Muhammad Ahmed   Arif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1:30 - 02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029000</text:p>
          </table:table-cell>
          <table:table-cell office:value-type="string">
            <text:p>ALESHA   ASSAD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0122025</text:p>
          </table:table-cell>
          <table:table-cell office:value-type="string">
            <text:p>NA</text:p>
          </table:table-cell>
          <table:table-cell office:value-type="string">
            <text:p>Y8-G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01234567</text:p>
          </table:table-cell>
          <table:table-cell office:value-type="string">
            <text:p>IZHAN   UMAIR</text:p>
          </table:table-cell>
          <table:table-cell office:value-type="string">
            <text:p>YR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19082014</text:p>
          </table:table-cell>
          <table:table-cell office:value-type="string">
            <text:p>Abdul   Rehman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20162425</text:p>
          </table:table-cell>
          <table:table-cell office:value-type="string">
            <text:p>Ibrahim   Khurram</text:p>
          </table:table-cell>
          <table:table-cell office:value-type="string">
            <text:p>Y4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20322665</text:p>
          </table:table-cell>
          <table:table-cell office:value-type="string">
            <text:p>Muhammad Usman   Mujtaba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23456789</text:p>
          </table:table-cell>
          <table:table-cell office:value-type="string">
            <text:p>Hamdan   Ali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25262728</text:p>
          </table:table-cell>
          <table:table-cell office:value-type="string">
            <text:p>Muhammad   Moeed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29082012</text:p>
          </table:table-cell>
          <table:table-cell office:value-type="string">
            <text:p>Hiba   Usman</text:p>
          </table:table-cell>
          <table:table-cell office:value-type="string">
            <text:p>Y8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29292929</text:p>
          </table:table-cell>
          <table:table-cell office:value-type="string">
            <text:p>BILAL   KHALID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29293333</text:p>
          </table:table-cell>
          <table:table-cell office:value-type="string">
            <text:p>Aiyesha    Muhammad Abu Bakar Roshan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10:30 - 11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44444422</text:p>
          </table:table-cell>
          <table:table-cell office:value-type="string">
            <text:p>SHAYAAN   AHMER</text:p>
          </table:table-cell>
          <table:table-cell office:value-type="string">
            <text:p>Y9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62762295</text:p>
          </table:table-cell>
          <table:table-cell office:value-type="string">
            <text:p>Rahmah   Mohammad Minhaj</text:p>
          </table:table-cell>
          <table:table-cell office:value-type="string">
            <text:p>Y9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67894152</text:p>
          </table:table-cell>
          <table:table-cell office:value-type="string">
            <text:p>Ismail 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70223014</text:p>
          </table:table-cell>
          <table:table-cell office:value-type="string">
            <text:p>Laith Shadi Abdullah Abdulrahman Khan    Khan</text:p>
          </table:table-cell>
          <table:table-cell office:value-type="string">
            <text:p>Y7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3-Aug-25</text:p>
          </table:table-cell>
          <table:table-cell office:value-type="string">
            <text:p>08:30-09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74010611</text:p>
          </table:table-cell>
          <table:table-cell office:value-type="string">
            <text:p>muhammad   Arham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74105875</text:p>
          </table:table-cell>
          <table:table-cell office:value-type="string">
            <text:p>Noor e    haram</text:p>
          </table:table-cell>
          <table:table-cell office:value-type="string">
            <text:p>Y1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85687985</text:p>
          </table:table-cell>
          <table:table-cell office:value-type="string">
            <text:p>Hamdan Wali   Haider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88888888</text:p>
          </table:table-cell>
          <table:table-cell office:value-type="string">
            <text:p>miraal   Anas</text:p>
          </table:table-cell>
          <table:table-cell office:value-type="string">
            <text:p>YN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4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99632578</text:p>
          </table:table-cell>
          <table:table-cell office:value-type="string">
            <text:p>Maryam</text:p>
          </table:table-cell>
          <table:table-cell office:value-type="string">
            <text:p>Y2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12:30  - 01: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99904702</text:p>
          </table:table-cell>
          <table:table-cell office:value-type="string">
            <text:p>Muhammad Umar   Saqib</text:p>
          </table:table-cell>
          <table:table-cell office:value-type="string">
            <text:p>Y6-B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99982907</text:p>
          </table:table-cell>
          <table:table-cell office:value-type="string">
            <text:p>Maryam   Saqib</text:p>
          </table:table-cell>
          <table:table-cell office:value-type="string">
            <text:p>Y1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1-Aug-25</text:p>
          </table:table-cell>
          <table:table-cell office:value-type="string">
            <text:p>09:30-10:30 a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570767131</text:p>
          </table:table-cell>
          <table:table-cell office:value-type="string">
            <text:p>Ayra   Khan</text:p>
          </table:table-cell>
          <table:table-cell office:value-type="string">
            <text:p>Y5-G</text:p>
          </table:table-cell>
          <table:table-cell office:value-type="string">
            <text:p>Passed</text:p>
          </table:table-cell>
          <table:table-cell office:value-type="string">
            <text:p>No</text:p>
          </table:table-cell>
          <table:table-cell office:value-type="string">
            <text:p>25-Aug-25</text:p>
          </table:table-cell>
          <table:table-cell office:value-type="string">
            <text:p>11:30 am - 12: 30 p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Reg_No</text:p>
          </table:table-cell>
          <table:table-cell office:value-type="string">
            <text:p>Name</text:p>
          </table:table-cell>
          <table:table-cell office:value-type="string">
            <text:p>Class</text:p>
          </table:table-cell>
          <table:table-cell office:value-type="string">
            <text:p>Result</text:p>
          </table:table-cell>
          <table:table-cell office:value-type="string">
            <text:p>Iqama_Expired</text:p>
          </table:table-cell>
          <table:table-cell office:value-type="string">
            <text:p>Appointment_Date</text:p>
          </table:table-cell>
          <table:table-cell office:value-type="string">
            <text:p>Appointment_Time</text:p>
          </table:table-cell>
          <table:table-cell office:value-type="string">
            <text:p>is_paid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6-04-21T23:18:00+03:00</meta:creation-date>
  </office:meta>
</office:document-meta>
</file>